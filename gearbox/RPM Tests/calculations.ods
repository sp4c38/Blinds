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465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52in"/>
    </style:style>
    <style:style style:name="co5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Time for one rotations (sec)</text:p>
          </table:table-cell>
          <table:table-cell table:formula="of:=0.344" office:value-type="float" office:value="0.344" calcext:value-type="float">
            <text:p>0.344</text:p>
          </table:table-cell>
          <table:table-cell/>
          <table:table-cell office:value-type="string" calcext:value-type="string">
            <text:p>Length of carpet (cm)</text:p>
          </table:table-cell>
          <table:table-cell table:formula="of:=126" office:value-type="float" office:value="126" calcext:value-type="float">
            <text:p>126</text:p>
          </table:table-cell>
        </table:table-row>
        <table:table-row table:style-name="ro1">
          <table:table-cell/>
          <table:table-cell table:formula="of:=0.0143" office:value-type="float" office:value="0.0143" calcext:value-type="float">
            <text:p>0.0143</text:p>
          </table:table-cell>
          <table:table-cell/>
          <table:table-cell office:value-type="string" calcext:value-type="string">
            <text:p>Bar rotations for winding 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table:formula="of:=ROUNDUP(60/[.B1]; 0)" office:value-type="float" office:value="175" calcext:value-type="float">
            <text:p>175</text:p>
          </table:table-cell>
          <table:table-cell/>
          <table:table-cell office:value-type="string" calcext:value-type="string">
            <text:p>Wanted winding time (sec)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eeded RPM</text:p>
          </table:table-cell>
          <table:table-cell table:formula="of:=([.E2]/[.E3])*60" office:value-type="float" office:value="48" calcext:value-type="float">
            <text:p>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M translation</text:p>
          </table:table-cell>
          <table:table-cell table:formula="of:=[.B3]/[.E5]" office:value-type="float" office:value="3.64583333333333" calcext:value-type="float">
            <text:p>3.64583333333333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7:23:35.481449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3:39:15.859956253</meta:creation-date>
    <meta:generator>LibreOffice/7.3.0.3$MacOSX_AARCH64 LibreOffice_project/0f246aa12d0eee4a0f7adcefbf7c878fc2238db3</meta:generator>
    <dc:date>2022-02-19T17:23:12.674977687</dc:date>
    <meta:editing-duration>PT2H25M18S</meta:editing-duration>
    <meta:editing-cycles>3</meta:editing-cycles>
    <meta:document-statistic meta:table-count="1" meta:cell-count="15" meta:object-count="0"/>
  </office:meta>
</office:document-meta>
</file>